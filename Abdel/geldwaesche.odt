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sans-serif"/>
    <style:font-face style:name="Helvetica" svg:font-family="Helvetica, Arial, sans-serif"/>
    <style:font-face style:name="Rockwell" svg:font-family="Rockwell"/>
    <style:font-face style:name="Tahoma1" svg:font-family="Tahom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fo:font-size="14pt" style:font-size-asian="14pt" style:font-size-complex="14pt"/>
    </style:style>
    <style:style style:name="P3" style:family="paragraph" style:parent-style-name="Text_20_body">
      <style:text-properties fo:font-variant="normal" fo:text-transform="none" fo:color="#000000" style:font-name="Rockwell" fo:font-size="14pt" fo:letter-spacing="normal" fo:font-style="normal" style:text-underline-style="solid" style:text-underline-width="auto" style:text-underline-color="font-color" fo:font-weight="bold" style:font-size-asian="14pt" style:font-size-complex="14pt"/>
    </style:style>
    <style:style style:name="P4" style:family="paragraph" style:parent-style-name="Text_20_body">
      <style:text-properties fo:font-variant="normal" fo:text-transform="none" fo:color="#000000" style:font-name="Rockwell" fo:font-size="14pt" fo:letter-spacing="normal" fo:font-style="normal" fo:font-weight="normal"/>
    </style:style>
    <style:style style:name="P5" style:family="paragraph" style:parent-style-name="Text_20_body">
      <style:paragraph-properties fo:margin-left="0cm" fo:margin-right="0cm" fo:text-indent="0cm" style:auto-text-indent="false"/>
      <style:text-properties fo:font-variant="normal" fo:text-transform="none" fo:color="#000000" style:font-name="Rockwell" fo:font-size="14pt" fo:letter-spacing="normal" fo:font-style="normal" fo:font-weight="normal"/>
    </style:style>
    <style:style style:name="P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Rockwell" fo:font-size="14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font-name="Rockwell" fo:font-size="14pt" fo:letter-spacing="normal" fo:font-style="normal" style:text-underline-style="solid" style:text-underline-width="auto" style:text-underline-color="font-color" fo:font-weight="bold"/>
    </style:style>
    <style:style style:name="P8" style:family="paragraph" style:parent-style-name="Text_20_body">
      <style:paragraph-properties fo:margin-left="0cm" fo:margin-right="0cm" fo:text-indent="0cm" style:auto-text-indent="false"/>
      <style:text-properties fo:font-size="14pt" style:font-size-asian="14pt" style:font-size-complex="14pt"/>
    </style:style>
    <style:style style:name="P9" style:family="paragraph" style:parent-style-name="Text_20_body">
      <style:paragraph-properties fo:margin-left="0cm" fo:margin-right="0cm" fo:text-align="start" style:justify-single-word="false" fo:text-indent="0cm" style:auto-text-indent="false"/>
      <style:text-properties fo:color="#000000" fo:font-size="14pt" style:font-size-asian="14pt" style:font-size-complex="14pt"/>
    </style:style>
    <style:style style:name="P10"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font-variant="normal" fo:text-transform="none" fo:color="#000000" style:font-name="Helvetica" fo:font-size="14pt" fo:letter-spacing="normal" fo:font-style="normal" fo:font-weight="normal" style:font-size-asian="14pt" style:font-size-complex="14pt"/>
    </style:style>
    <style:style style:name="P11"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font-variant="normal" fo:text-transform="none" fo:color="#000000" style:font-name="Helvetica" fo:font-size="14pt" fo:letter-spacing="normal" fo:font-style="normal" style:text-underline-style="solid" style:text-underline-width="auto" style:text-underline-color="font-color" fo:font-weight="normal" style:font-size-asian="14pt" style:font-size-complex="14pt"/>
    </style:style>
    <style:style style:name="P12" style:family="paragraph" style:parent-style-name="Text_20_body">
      <style:paragraph-properties style:writing-mode="lr-tb"/>
      <style:text-properties fo:font-variant="normal" fo:text-transform="none" fo:color="#000000" style:font-name="Rockwell" fo:font-size="14pt" fo:letter-spacing="normal" fo:font-style="normal" fo:font-weight="normal"/>
    </style:style>
    <style:style style:name="P13" style:family="paragraph" style:parent-style-name="Standard">
      <style:paragraph-properties fo:margin-left="0cm" fo:margin-right="0cm" fo:text-align="justify" style:justify-single-word="false" fo:text-indent="0cm" style:auto-text-indent="false"/>
      <style:text-properties fo:color="#000000"/>
    </style:style>
    <style:style style:name="P14" style:family="paragraph" style:parent-style-name="Heading_20_3">
      <style:paragraph-properties fo:margin-left="0cm" fo:margin-right="0cm" fo:text-align="start" style:justify-single-word="false" fo:text-indent="0cm" style:auto-text-indent="false"/>
      <style:text-properties fo:color="#000000" fo:font-size="14pt" style:font-size-asian="14pt" style:font-size-complex="14pt"/>
    </style:style>
    <style:style style:name="T1" style:family="text">
      <style:text-properties fo:font-variant="normal" fo:text-transform="none" fo:color="#003572" style:font-name="Rockwell" fo:font-size="14pt" fo:letter-spacing="normal" fo:font-style="normal" style:text-underline-style="solid" style:text-underline-width="auto" style:text-underline-color="font-color" fo:font-weight="bold"/>
    </style:style>
    <style:style style:name="T2" style:family="text">
      <style:text-properties fo:font-variant="normal" fo:text-transform="none" fo:color="#000000" style:font-name="Arial1" fo:font-size="8.25pt" fo:letter-spacing="normal" fo:font-style="normal" fo:font-weight="normal"/>
    </style:style>
    <style:style style:name="T3" style:family="text">
      <style:text-properties fo:font-variant="normal" fo:text-transform="none" fo:color="#000000" style:font-name="Arial1" fo:letter-spacing="normal"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style:font-name="Rockwell" fo:font-size="14pt" fo:letter-spacing="normal" fo:font-style="normal" style:text-underline-style="solid" style:text-underline-width="auto" style:text-underline-color="font-color" fo:font-weight="bold"/>
    </style:style>
    <style:style style:name="T6" style:family="text">
      <style:text-properties fo:font-variant="normal" fo:text-transform="none" style:font-name="Arial1" fo:letter-spacing="normal" fo:font-style="normal" fo:font-weight="normal"/>
    </style:style>
    <style:style style:name="T7" style:family="text">
      <style:text-properties fo:font-variant="normal" fo:text-transform="none" fo:letter-spacing="normal"/>
    </style:style>
    <style:style style:name="T8" style:family="text">
      <style:text-properties fo:font-variant="normal" fo:text-transform="none" style:font-name="verdana" fo:font-size="12pt" fo:letter-spacing="normal" fo:font-style="normal" fo:font-weight="bold"/>
    </style:style>
    <style:style style:name="T9" style:family="text">
      <style:text-properties fo:font-variant="normal" fo:text-transform="none" style:font-name="verdana" fo:letter-spacing="normal" fo:font-style="normal"/>
    </style:style>
    <style:style style:name="T10" style:family="text">
      <style:text-properties fo:font-variant="normal" fo:text-transform="none" style:font-name="verdana" fo:letter-spacing="normal" fo:font-style="normal" fo:font-weight="bold"/>
    </style:style>
    <style:style style:name="T11" style:family="text">
      <style:text-properties fo:font-variant="normal" fo:text-transform="none" style:font-name="verdana" fo:letter-spacing="normal" fo:font-style="normal" fo:font-weight="bold" style:font-weight-asian="bold" style:font-weight-complex="bold"/>
    </style:style>
    <style:style style:name="T12" style:family="text">
      <style:text-properties fo:font-variant="normal" fo:text-transform="none" style:font-name="verdana" fo:letter-spacing="normal" fo:font-style="normal" fo:font-weight="normal" style:font-weight-asian="normal" style:font-weight-complex="normal"/>
    </style:style>
    <style:style style:name="T13" style:family="text">
      <style:text-properties fo:font-variant="normal" fo:text-transform="none" style:font-name="verdana" fo:letter-spacing="normal" fo:font-style="normal" style:text-underline-style="solid" style:text-underline-width="auto" style:text-underline-color="font-color" fo:font-weight="bold" style:font-weight-asian="bold" style:font-weight-complex="bold"/>
    </style:style>
    <style:style style:name="T14" style:family="text">
      <style:text-properties fo:font-weight="bold"/>
    </style:style>
    <style:style style:name="T15" style:family="text">
      <style:text-properties fo:color="#000000"/>
    </style:style>
    <style:style style:name="T16" style:family="text">
      <style:text-properties fo:font-size="10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5">Was ist Geldwäsche?</text:span> </text:p>
      <text:p text:style-name="P13"/>
      <text:p text:style-name="P6">Ein oft gehörter, aber nie verstandener Begriff. Mann wäscht Geld, welches schmutzig ist. Folgende Definition hilft weiter:</text:p>
      <text:p text:style-name="P5">Geldwäsche ist das Verbergen, Verschleiern der Herkunft, Vereiteln oder Gefährden der Ermittlung der Herkunft, des Auffindens, des Verfalls der Einziehung oder der Sicherstellung eines aus einem Verbrechen eines anderen oder aus bestimmten Vergehen eines anderen herrührenden Gegenstandes</text:p>
      <text:p text:style-name="P13"><text:span text:style-name="T5">Wo kommt das zu waschende Geld meist her?</text:span> </text:p>
      <text:p text:style-name="P6">Rauschgifthandel, Zigarettenschmuggel, Rotlichtmilieu.</text:p>
      <text:p text:style-name="P1"><text:line-break/><text:span text:style-name="T5">Wie läuft Geldwäsche ab? Beispiel aus der Praxis:</text:span> </text:p>
      <text:p text:style-name="P5">X ist Kokainhändler und verkauft ein Kilogramm Kokain. Den daraus erzielten Gewinn will er nicht einfach so ausgeben, um kein Aufsehen zu erregen.</text:p>
      <text:p text:style-name="P5">X eröffnet eine Kneipe und gibt an, dass die Gewinne, welche eigentlich aus dem Kokainhandel stammen, durch den Ausschank von Getränken und Bewirtung erzielt wurde.</text:p>
      <text:p text:style-name="P7">Warum kommt die Polizei Geldwäschern regelmäßig auf die Schliche?</text:p>
      <text:p text:style-name="P5">Wir bleiben bei unserem Beispiel mit dem X.</text:p>
      <text:p text:style-name="P5">X müsste sich, um die Gewinne aus seiner Kneipe zu rechtfertigen, diese auf regelmäßig betreiben. X muss sich jedoch auch um seine Drogengeschäfte kümmern.</text:p>
      <text:p text:style-name="P5">Keine Gäste bedeutet auch kein Umsatz. Schnell werden Fragen gestellt, wo denn das ganze Geld plötzlich herkommt. X steht in Verdacht, Geldwäsche zu betreiben.</text:p>
      <text:p text:style-name="P7">Geldwäsche: Eine Tat von organisierter Wirtschaftskriminalität?</text:p>
      <text:p text:style-name="P5">Wenn man an Geldwäsche denkt, dann assoziiert man damit die Mafia, Bandenstrukturen und riesige Summen an Geld. Nur organisierte Wirtschaftskriminelle begehen Geldwäsche. Dies ist ein Irrglaube.</text:p>
      <text:p text:style-name="P5">Geldwäsche kann jeder Bürger betreiben:</text:p>
      <text:p text:style-name="P5">Wenn Sie in möglicher Kenntnis der illegalen Herkunft derartiger Mittel Geld von einem Dritten annehmen, und sei es als angemessene Bezahlung für eine korrekt erbrachte Leistung, dann <text:soft-page-break/>machen Sie sich wegen Geldwäsche strafbar.</text:p>
      <text:p text:style-name="P5">Dies gilt für jede Branche. Sollten Sie Zweifel an der Herkunft des Ihnen übergeben Geldes haben, dann nehmen Sie lieber Abstand von dem Geschäft. Im Zweifel müssen Sie sich mit dem Vorwurf der Geldwäsche auseinandersetzen.</text:p>
      <text:p text:style-name="P5">Auch Rechtsanwälte – insbesondere Strafverteidiger – müssen aufpassen, aus welchen Mitteln der Mandant sie bezahlt.</text:p>
      <text:p text:style-name="P7">Geldwäsche - Ein lohnenswertes Geschäft?</text:p>
      <text:p text:style-name="P5">Geldwäsche bedeutet, dass regelmäßig ein hoher Aufwand betrieben werden muss, um das Geld gründlich zu waschen. Je komplexer und undurchschaubarer die Geschäftsstruktur, desto größer ist auch die Chance, dass die Geldwäsche unerkannt bleibt.</text:p>
      <text:p text:style-name="P5">Die eingebrachten Einnahmen müssen selbstverständlich auch versteuert werden. Dies führt zu einem Verlust.</text:p>
      <text:p text:style-name="P5">Der Aufwand wird dennoch betrieben, weil letztendlich der Täter auch das Geld ausgeben will. Das kann er nicht, wenn es offensichtlich aus dubiosen Quellen stammt.</text:p>
      <text:p text:style-name="P5">Geldwäsche, wie andere Straftaten in Deutschland, lohnt sich unterm Strich jedoch deshalb nicht, weil die deutschen Ermittlungsbehörden einfach sehr gewissenhaft arbeiten. Die gute Aufklärungsquote der Polizei spricht gegen den Erfolg einer Geldwäsche.</text:p>
      <text:p text:style-name="P5"/>
      <text:p text:style-name="P3">Wie wird Geldwäsche bestraft?</text:p>
      <text:p text:style-name="P5">Mit einer Freiheitsstrafe von 3 Monaten bis zu 5 Jahren</text:p>
      <text:p text:style-name="P5">In besonders schweren Fällen von 6 Monaten bis zu 10 Jahren.</text:p>
      <text:p text:style-name="P5">Ein leichtfertiger Verstoß gegen das Strafgesetz wird mit Geldstrafe oder Freiheitsstrafe bis zu 2 Jahren geahndet.</text:p>
      <text:p text:style-name="P5">Lassen Sie sich umfassend beraten, um Ihre Verteidigung vorzubereiten. Ich werde mich auch mit der Abteilung für Wirtschaftskriminalität in Verbindung setzen, um ein optimales Ermittlungs- und Hauptverfahrensergebnis zu erzielen. Ich wurde unter anderem in  der Abteilung für Wirtschaftskriminalität bei der Staatsanwaltschaft Essen ausgebildet.</text:p>
      <text:p text:style-name="P7">Wann wird Geldwäsche bestraft? (Gesetzeswortlaut)</text:p>
      <text:p text:style-name="P5">Der Gesetzeswortlaut der Geldwäsche ist lang, zäh und nicht besonders gut gelungen. Geldwäsche ist ein komplexes Thema, welches nicht durch ein paar Sätze geregelt werden kann:</text:p>
      <text:p text:style-name="P5"><text:soft-page-break/>(1) Wer einen Gegenstand, der aus einer in Satz 2 genannten rechtswidrigen Tat herrührt, verbirgt, dessen Herkunft verschleiert oder die Ermittlung der Herkunft, das Auffinden, den Verfall, die Einziehung oder die Sicherstellung eines solchen Gegenstandes vereitelt oder gefährdet, wird mit Freiheitsstrafe von drei Monaten bis zu fünf Jahren bestraft. <text:line-break/>Rechtswidrige Taten im Sinne des Satzes 1 sind</text:p>
      <text:p text:style-name="P5">1.Verbrechen,</text:p>
      <text:p text:style-name="P5">2.Vergehen nach</text:p>
      <text:p text:style-name="P4">a.   § 332 Abs. 1, auch in Verbindung mit Abs. 3, und § 334,</text:p>
      <text:p text:style-name="P4">b.   § 29 Abs. 1 Satz 1 Nr. 1 des Betäubungsmittelgesetzes und § 29 Abs. 1 Nr. 1 des Grundstoffüberwachungsgesetzes,</text:p>
      <text:p text:style-name="P5">3.Vergehen nach § 373 und, wenn der Täter gewerbsmäßig handelt, nach § 374 der Abgabenordnung, jeweils auch in Verbindung mit § 12 Abs. 1 des Gesetzes zur Durchführung der Gemeinsamen Marktorganisationen und der Direktzahlungen,</text:p>
      <text:p text:style-name="P5">4.Vergehen</text:p>
      <text:p text:style-name="P4">a. nach den §§ 152a, 181a, 232 Abs. 1 und 2, § 233 Abs. 1 und 2, §§ 233a, 242, 246, 253, 259, 263 bis 264, 266, 267, 269, 284, 326 Abs. 1, 2 und 4 sowie § 328 Abs. 1, 2 und 4,</text:p>
      <text:p text:style-name="P5">b. nach § 96 des Aufenthaltsgesetzes und § 84 des Asylverfahrensgesetzes,</text:p>
      <text:p text:style-name="P5">die gewerbsmäßig oder von einem Mitglied einer Bande, die sich zur fortgesetzten Begehung solcher Taten verbunden hat, begangen worden sind, und</text:p>
      <text:p text:style-name="P5">5. Vergehen nach §§ 129 und 129a Abs. 3 und 5, jeweils auch in Verbindung mit § 129b Abs. 1, sowie von einem Mitglied einer kriminellen oder terroristischen Vereinigung (§§ 129, 129a, jeweils auch in Verbindung mit § 129b Abs. 1) begangene Vergehen.</text:p>
      <text:p text:style-name="P5">Satz 1 gilt in den Fällen der gewerbsmäßigen oder bandenmäßigen Steuerhinterziehung nach § 370a der Abgabenordnung für die durch die Steuerhinterziehung ersparten Aufwendungen und unrechtmäßig erlangten Steuererstattungen und -vergütungen sowie in den Fällen des Satzes 2 Nr. 3 auch für einen Gegenstand, hinsichtlich dessen Abgaben hinterzogen worden sind.</text:p>
      <text:p text:style-name="P4">(2) Ebenso wird bestraft, wer einen in Absatz 1 bezeichneten Gegenstand</text:p>
      <text:p text:style-name="P12"><text:span text:style-name="T16">1.       </text:span>sich oder einem Dritten verschafft oder</text:p>
      <text:p text:style-name="P12"><text:span text:style-name="T16">2.       </text:span>verwahrt oder für sich oder einen Dritten verwendet, wenn er <text:soft-page-break/>die Herkunft des Gegenstandes zu dem Zeitpunkt gekannt hat, zu dem er ihn erlangt hat.</text:p>
      <text:p text:style-name="P5">(3) Der Versuch ist strafbar.</text:p>
      <text:p text:style-name="P5">(4) In besonders schweren Fällen ist die Strafe Freiheitsstrafe von sechs Monaten bis zu zehn Jahren. Ein besonders schwerer Fall liegt in der Regel vor, wenn der Täter gewerbsmäßig oder als Mitglied einer Bande handelt, die sich zur fortgesetzten Begehung einer Geldwäsche verbunden hat.</text:p>
      <text:p text:style-name="P5">(5) <text:bookmark text:name="Wer_in_den_Fällen_des_Absatzes"/>Wer in den Fällen des Absatzes 1 oder 2 leichtfertig nicht erkennt, dass der Gegenstand aus einer in Absatz 1 genannten rechtswidrigen Tat herrührt, wird mit Freiheitsstrafe bis zu zwei Jahren oder mit Geldstrafe bestraft.</text:p>
      <text:p text:style-name="P5">(6) Die Tat ist nicht nach Absatz 2 strafbar, wenn zuvor ein Dritter den Gegenstand erlangt hat, ohne hierdurch eine Straftat zu begehen.</text:p>
      <text:p text:style-name="P5">(7) Gegenstände, auf die sich die Straftat bezieht, können eingezogen werden. § 74a ist anzuwenden. Die §§ 43a, 73d sind anzuwenden, wenn der Täter als Mitglied einer Bande handelt, die sich zur fortgesetzten Begehung einer Geldwäsche verbunden hat. § 73d ist auch dann anzuwenden, wenn der Täter gewerbsmäßig handelt.</text:p>
      <text:p text:style-name="P5">(8) Den in den Absätzen 1, 2 und 5 bezeichneten Gegenständen stehen solche gleich, die aus einer im Ausland begangenen Tat der in Absatz 1 bezeichneten Art herrühren, wenn die Tat auch am Tatort mit Strafe bedroht ist.</text:p>
      <text:p text:style-name="P5">(9) Nach den Absätzen 1 bis 5 wird nicht bestraft, wer</text:p>
      <text:p text:style-name="P12"><text:span text:style-name="T16">1.       </text:span>die Tat freiwillig bei der zuständigen Behörde anzeigt oder freiwillig eine solche Anzeige veranlasst, wenn nicht die Tat in diesem Zeitpunkt ganz oder zum Teil bereits entdeckt war und der Täter dies wusste oder bei verständiger Würdigung der Sachlage damit rechnen musste, und</text:p>
      <text:p text:style-name="P12"><text:span text:style-name="T16">2.       </text:span>in den Fällen des Absatzes 1 oder 2 unter den in Nummer 1 genannten Voraussetzungen die Sicherstellung des Gegenstandes bewirkt, auf den sich die Straftat bezieht.</text:p>
      <text:p text:style-name="P5">Nach den Absätzen 1 bis 5 wird außerdem nicht bestraft, wer wegen Beteiligung an der Vortat strafbar ist.</text:p>
      <text:p text:style-name="P5">(10) Das Gericht kann in den Fällen der Absätze 1 bis 5 die Strafe nach seinem Ermessen mildern (§ 49 Abs. 2) oder von Strafe nach diesen Vorschriften absehen, wenn der Täter durch die freiwillige Offenbarung seines Wissens wesentlich dazu beigetragen hat, dass <text:soft-page-break/>die Tat über seinen eigenen Tatbeitrag hinaus oder eine in Absatz 1 genannte rechtswidrige Tat eines anderen aufgedeckt werden konnte.</text:p>
      <text:p text:style-name="P5"/>
      <text:p text:style-name="P2"/>
      <text:h text:style-name="P14" text:outline-level="3"><text:span text:style-name="Strong_20_Emphasis"><text:span text:style-name="T13">Mehr Ausgaben für Anti-Geldwäsche-Maßnahmen</text:span></text:span></text:h>
      <text:p text:style-name="P8"/>
      <text:section text:style-name="Sect1" text:name="adtagcontent">
        <text:p text:style-name="P10">Mit der Veröffentlichung im Amtsblatt der Europäischen Union ist im Dezember die Dritte Anti-Geldwäsche-Richtlinie der EU in Kraft getreten. Sie verschärft die Geldwäschevorschriften in den Mitgliedstaaten und somit auch in Deutschland erheblich. Darauf weist der Anti-Geldwäsche-Spezialist WorldCompliance hin. Deutschland muss die Richtlinie bis spätestens Ende 2007 umsetzen. Die neuen Vorschriften zur Bekämpfung von Geldwäsche, Korruption und Terrorismusfinanzierung betreffen hauptsächlich Finanzdienstleister wie Banken und Kapitalanlagegesellschaften. Darüber hinaus verpflichten sie jedoch auch zahlreiche mittelständische Unternehmen, die regelmäßig Bargeldbeträge von mehr als 15.000 € annehmen. Dazu gehören z.B. Juweliere und Auktionshäuser. Diese werden noch stärker als bisher angehalten, die Identität des Kunden sowie die Herkunft des Geldes zu überprüfen. Finanzdienstleister müssen, das ist neu, künftig neben den abzuwickelnden Finanztransaktionen auch besondere Sorgfalt bei bestimmten Kundengruppen anlegen. Dazu zählen besonders die so genannten „Politisch Exponierten Personen“, also Abgeordnete und Regierungsmitglieder. Die neue Anti-Geldwäsche-Richtlinie stellt Finanzdienstleister und insbesondere kleinere Institute, die nicht von einem Verband unterstützt werden, vor erhebliche Herausforderungen.</text:p>
        <text:p text:style-name="P10"/>
        <text:p text:style-name="P11"><text:span text:style-name="T14">Neue Vorschriften für Finanzdienstleister und andere Branchen</text:span></text:p>
        <text:p text:style-name="P10"><text:span text:style-name="T14"><text:line-break/></text:span>Die neue Richtlinie sieht einen risikoorientierten Ansatz im so genannten „Compliance Bereich“ vor und erfordert das regelmäßige Überprüfen des Kundenstamms und die kontinuierliche Prüfung von Transaktionen auf Geldwäsche-Indikatoren. Dies können nur umfassendere Datenbanken und IT-Systeme leisten. WorldCompliance geht daher davon aus, dass die Ausgaben für Anti-Geldwäsche-Maßnahmen in Deutschland steigen werden. In den USA, wo nach dem 11. September ebenfalls die Vorschriften verschärft wurden, stiegen die Ausgaben im Compliance Bereich im vergangenen Jahr um etwa 30 %.</text:p>
        <text:p text:style-name="P10"/>
        <text:p text:style-name="P11"><text:span text:style-name="T14">In Deutschland werden jährlich 100 Mrd. € gewaschen</text:span></text:p>
        <text:p text:style-name="P10"><text:span text:style-name="T14"><text:line-break/></text:span>Experten gehen davon aus, dass jährlich allein in Deutschland illegal <text:soft-page-break/>erworbene Gelder mit einem Volumen von 100 Milliarden Euro „gewaschen“, also in den regulären Wirtschaftskreislauf überführt werden. WorldCompliance bietet in diesem Rahmen eine bereits in etwa 100 Staaten genutzte Datenbank gegen Geldwäsche und Korruption an. Sie enthält die Profile von mehr als 600.000 international der Korruption, der Geldwäsche oder des Terrorismus verdächtigter Personen inklusive Details über deren soziale sowie geschäftliche Netzwerke. Die Datenbank bietet zudem die Verknüpfung mit etwa 850.000 externen Quellen, zum Beispiel Fahndungslisten, und kann in bestehende Anti-Geldwäsche-Systeme integriert werden, um den neuen Sorgfaltsplichten nachzukommen und automatisch Verdachtsmeldungen auszulösen. WorldCompliance analysiert und strukturiert risikorelevante Informationen weltweit in regionalen Research-Zentren, beispielweise in Russland oder Ungarn.</text:p>
      </text:section>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serif"/>
    <style:font-face style:name="Helvetica" svg:font-family="Helvetica, Arial, sans-serif"/>
    <style:font-face style:name="Rockwell" svg:font-family="Rockwell"/>
    <style:font-face style:name="Tahoma1" svg:font-family="Tahom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5M4S</meta:editing-duration>
    <meta:editing-cycles>3</meta:editing-cycles>
    <meta:generator>OpenOffice.org/3.3$Win32 OpenOffice.org_project/330m20$Build-9567</meta:generator>
    <dc:date>2013-10-12T16:46:49.97</dc:date>
    <meta:document-statistic meta:table-count="0" meta:image-count="0" meta:object-count="0" meta:page-count="6" meta:paragraph-count="62" meta:word-count="1599" meta:character-count="11158"/>
    <meta:user-defined meta:name="Info 1"/>
    <meta:user-defined meta:name="Info 2"/>
    <meta:user-defined meta:name="Info 3"/>
    <meta:user-defined meta:name="Info 4"/>
  </office:meta>
</office:document-meta>
</file>